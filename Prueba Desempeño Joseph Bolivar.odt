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E79B3F4D.png" manifest:media-type="image/png"/>
  <manifest:file-entry manifest:full-path="Pictures/1000000100000696000001B54E985B05.png" manifest:media-type="image/png"/>
  <manifest:file-entry manifest:full-path="Pictures/100000010000068C000001B4779FAB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officeooo:rsid="00080811" officeooo:paragraph-rsid="00080811"/>
    </style:style>
    <style:style style:name="P2" style:family="paragraph" style:parent-style-name="Standard">
      <style:text-properties style:text-line-through-style="none" style:text-line-through-type="none" style:font-name="Google Sans" fo:font-size="15pt" style:text-underline-style="none" fo:font-weight="bold" officeooo:rsid="0009f79d" officeooo:paragraph-rsid="00080811" style:text-blinking="false" loext:padding="0cm" loext:border="none"/>
    </style:style>
    <style:style style:name="P3" style:family="paragraph" style:parent-style-name="Standard">
      <style:text-properties style:text-line-through-style="none" style:text-line-through-type="none" style:font-name="Google Sans" fo:font-size="15pt" style:text-underline-style="none" fo:font-weight="bold" officeooo:rsid="000ab74a" officeooo:paragraph-rsid="000ab74a" style:text-blinking="false" loext:padding="0cm" loext:border="none"/>
    </style:style>
    <style:style style:name="P4" style:family="paragraph" style:parent-style-name="Standard">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5" style:family="paragraph" style:parent-style-name="Standard">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style:font-size-asian="12pt" style:font-size-complex="12pt" loext:padding="0cm" loext:border="none"/>
    </style:style>
    <style:style style:name="P6" style:family="paragraph" style:parent-style-name="Standard">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officeooo:paragraph-rsid="0009f79d" style:text-blinking="false" style:font-size-asian="12pt" style:font-size-complex="12pt" loext:padding="0cm" loext:border="none"/>
    </style:style>
    <style:style style:name="P7" style:family="paragraph" style:parent-style-name="Standard">
      <style:text-properties style:text-line-through-style="none" style:text-line-through-type="none" style:font-name="Google Sans" fo:font-size="12pt" style:text-underline-style="none" fo:font-weight="normal" officeooo:rsid="000bb539" officeooo:paragraph-rsid="000bb539" style:text-blinking="false" loext:padding="0cm" loext:border="none"/>
    </style:style>
    <style:style style:name="P8"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2pt" style:text-underline-style="none" fo:font-weight="bold" style:text-blinking="false" style:font-size-asian="12pt" style:font-size-complex="12pt" loext:padding="0cm" loext:border="none"/>
    </style:style>
    <style:style style:name="P9" style:family="paragraph" style:parent-style-name="Standard">
      <style:text-properties officeooo:rsid="000ab74a" officeooo:paragraph-rsid="000ab74a"/>
    </style:style>
    <style:style style:name="P10" style:family="paragraph" style:parent-style-name="Standard">
      <style:text-properties officeooo:rsid="000bb539" officeooo:paragraph-rsid="000bb539"/>
    </style:style>
    <style:style style:name="P11"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style>
    <style:style style:name="P12"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5" style:family="paragraph" style:parent-style-name="Text_20_body">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16" style:family="paragraph" style:parent-style-name="Text_20_body">
      <style:paragraph-properties fo:margin-left="0cm" fo:margin-right="0cm" fo:margin-top="0cm" fo:margin-bottom="0cm" style:contextual-spacing="false" fo:text-indent="0cm" style:auto-text-indent="false"/>
      <style:text-properties officeooo:paragraph-rsid="000d4fd7"/>
    </style:style>
    <style:style style:name="T1" style:family="text">
      <style:text-properties style:text-line-through-style="none" style:text-line-through-type="none" style:font-name="Google Sans" fo:font-size="12pt" style:text-underline-style="none" fo:font-weight="bold" style:text-blinking="false" loext:padding="0cm" loext:border="none"/>
    </style:style>
    <style:style style:name="T2" style:family="text">
      <style:text-properties style:text-line-through-style="none" style:text-line-through-type="none" style:font-name="Google Sans" fo:font-size="12pt" style:text-underline-style="none" fo:font-weight="normal" style:text-blinking="false"/>
    </style:style>
    <style:style style:name="T3" style:family="text">
      <style:text-properties style:text-line-through-style="none" style:text-line-through-type="none" style:font-name="Google Sans" fo:font-size="12pt" style:text-underline-style="none" fo:font-weight="normal" style:text-blinking="false" loext:padding="0cm" loext:border="none"/>
    </style:style>
    <style:style style:name="T4" style:family="text">
      <style:text-properties style:text-line-through-style="none" style:text-line-through-type="none" style:font-name="Google Sans" fo:font-size="12pt" style:text-underline-style="solid" style:text-underline-width="auto" style:text-underline-color="font-color" fo:font-weight="normal" style:text-blinking="false"/>
    </style:style>
    <style:style style:name="T5" style:family="text">
      <style:text-properties style:text-line-through-style="none" style:text-line-through-type="none" style:font-name="Google Sans" fo:font-size="12pt" style:text-underline-style="solid" style:text-underline-width="auto" style:text-underline-color="font-color" fo:font-weight="normal" style:text-blinking="false" loext:padding="0cm" loext:border="none"/>
    </style:style>
    <style:style style:name="T6" style:family="text">
      <style:text-properties style:text-line-through-style="none" style:text-line-through-type="none" style:font-name="monospace" fo:font-size="10.5pt" style:text-underline-style="none" fo:font-weight="normal" style:text-blinking="false" loext:padding-left="0cm" loext:padding-right="0cm" loext:padding-top="0cm" loext:padding-bottom="0.049cm" loext:border-left="none" loext:border-right="none" loext:border-top="none" loext:border-bottom="0.06pt solid #2c2e35"/>
    </style:style>
    <style:style style:name="T7" style:family="text">
      <style:text-properties style:text-line-through-style="none" style:text-line-through-type="none" style:font-name="monospace" fo:font-size="10.5pt" style:text-underline-style="solid" style:text-underline-width="auto" style:text-underline-color="font-color" fo:font-weight="normal" style:text-blinking="false" loext:padding-left="0cm" loext:padding-right="0cm" loext:padding-top="0cm" loext:padding-bottom="0.049cm" loext:border-left="none" loext:border-right="none" loext:border-top="none" loext:border-bottom="0.06pt solid #2c2e3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ormalization Joseph Bolivar</text:p>
      <text:p text:style-name="P8">Initial Document Format</text:p>
      <text:p text:style-name="P8"><draw:frame draw:style-name="fr2" draw:name="Imagen1" text:anchor-type="char" svg:x="-1.034cm" svg:y="-0.229cm" svg:width="19.616cm" svg:height="5.431cm" draw:z-index="0"><draw:image xlink:href="Pictures/100000010000068C000001B4779FAB92.png" xlink:type="simple" xlink:show="embed" xlink:actuate="onLoad" draw:mime-type="image/png"/></draw:frame>Problems Identified</text:p>
      <text:p text:style-name="P6">First, I noticed inconsistencies in the "Customer" column, where several names were written differently or contained improper spacing, resulting in a poor visual presentation of the document.</text:p>
      <text:p text:style-name="P6">In the "City" section, the same problem occurred. I normalized these names using proper capitalization, removing abbreviations, and adding accents where necessary.</text:p>
      <text:p text:style-name="P5">In the "Branch" column, the issue was identical to the previous columns, with locations being incomplete or misspelled.</text:p>
      <text:p text:style-name="P5">In the "Technician" column, some names were abbreviated. This shows a lack of professionalism, as it prevents properly tracking which technician performed the service.</text:p>
      <text:p text:style-name="P5">In the "Equipment" column, some device names were missing parts, contained incorrect spacing, or were misspelled.</text:p>
      <text:p text:style-name="P5">In the "Category" column, the names were misspelled or incomplete.</text:p>
      <text:p text:style-name="P5">In the "Service Type" column, there were abbreviations that did not look professional. Considering the words used in this column, terms like "install" and "repair" were incorrect, and the word "maintenance" was missing according to standard engineering terminology.</text:p>
      <text:p text:style-name="P5"><text:soft-page-break/>The remaining tables do not require normalization as their data is already correct.</text:p>
      <text:p text:style-name="P3"/>
      <text:p text:style-name="P3">Database Fixes - Phase 1</text:p>
      <text:p text:style-name="P4">In this phase, the previously mentioned inconsistencies were resolved in order to proceed to Phase 2 of data normalization. Names, spacing, terminology, classifications, and spelling issues were successfully corrected.</text:p>
      <text:p text:style-name="P9"/>
      <text:p text:style-name="P9"><draw:frame draw:style-name="fr2" draw:name="Imagen2" text:anchor-type="char" svg:x="-1.021cm" svg:y="0.127cm" svg:width="19.502cm" svg:height="5.487cm" draw:z-index="1"><draw:image xlink:href="Pictures/1000000100000696000001B54E985B05.png" xlink:type="simple" xlink:show="embed" xlink:actuate="onLoad" draw:mime-type="image/png"/></draw:frame></text:p>
      <text:p text:style-name="P7">"Subsequently, I decomposed the dataset into 8 distinct tables, isolating each primary and foreign key to guarantee a well-structured relational database schema. The normalization transformations are detailed below:</text:p>
      <text:p text:style-name="P4">Data pre-processing: All attributes were standardized prior to initiating the normalization process.</text:p>
      <text:list text:style-name="L1">
        <text:list-item>
          <text:p text:style-name="P11"><text:span text:style-name="Strong_20_Emphasis"><text:span text:style-name="T1">1NF (First Normal Form):</text:span></text:span><text:span text:style-name="T3"> Eliminated repeating groups; the primary key was structured around </text:span><text:span text:style-name="Source_20_Text"><text:span text:style-name="T6">order_id</text:span></text:span><text:span text:style-name="T3"> (</text:span><text:span text:style-name="Source_20_Text"><text:span text:style-name="T6">Dataset_normalizada</text:span></text:span><text:span text:style-name="T3">).</text:span><text:span text:style-name="T2"> </text:span></text:p>
        </text:list-item>
        <text:list-item>
          <text:p text:style-name="P11"><text:span text:style-name="Strong_20_Emphasis"><text:span text:style-name="T1">2NF (Second Normal Form):</text:span></text:span><text:span text:style-name="T3"> Since the table relies solely on a single-attribute primary key (</text:span><text:span text:style-name="Source_20_Text"><text:span text:style-name="T6">order_id</text:span></text:span><text:span text:style-name="T3">), no partial dependencies exist. Therefore, the schema inherently satisfies 2NF requirements.</text:span></text:p>
        </text:list-item>
        <text:list-item>
          <text:p text:style-name="P12"><text:span text:style-name="Strong_20_Emphasis"><text:span text:style-name="T1">3NF (Third Normal Form):</text:span></text:span><text:span text:style-name="T3"> Removed all transitive dependencies by decoupling columns into specialized entity tables and mapping the respective foreign keys sequentially.</text:span><text:span text:style-name="T2"> [</text:span><text:a xlink:type="simple" xlink:href="https://www.reddit.com/r/Database/comments/xiqn6p/help_with_3nf_normalisation/?tl=es-419" text:style-name="Internet_20_link" text:visited-style-name="Visited_20_Internet_20_Link"><text:span text:style-name="T4">1</text:span></text:a><text:span text:style-name="T2">, </text:span><text:a xlink:type="simple" xlink:href="https://www.datacamp.com/es/tutorial/third-normal-form" text:style-name="Internet_20_link" text:visited-style-name="Visited_20_Internet_20_Link"><text:span text:style-name="T4">2</text:span></text:a><text:span text:style-name="T2">]</text:span></text:p>
        </text:list-item>
      </text:list>
      <text:p text:style-name="P13"><text:span text:style-name="Strong_20_Emphasis"><text:span text:style-name="T1">Dependency Resolution:</text:span></text:span></text:p>
      <text:list text:style-name="L2">
        <text:list-item>
          <text:p text:style-name="P14"><text:span text:style-name="Strong_20_Emphasis"><text:span text:style-name="T1">Order-Client-Branch-City:</text:span></text:span><text:span text:style-name="T3"> Disconnected this chain because branch and city attributes depend functionally on the client, not on the order itself.</text:span></text:p>
        </text:list-item>
        <text:list-item>
          <text:p text:style-name="P14"><text:span text:style-name="Strong_20_Emphasis"><text:span text:style-name="T1">Order-Equipment-Category:</text:span></text:span><text:span text:style-name="T3"> Removed this dependency since the category is functionally dependent on the equipment entity.</text:span></text:p>
        </text:list-item>
        <text:list-item>
          <text:p text:style-name="P14"><text:soft-page-break/><text:span text:style-name="Strong_20_Emphasis"><text:span text:style-name="T1">Order-Technician-Service_Type:</text:span></text:span><text:span text:style-name="T3"> Dissolved this relationship by migrating entity names to their respective lookup tables.</text:span></text:p>
          <text:p text:style-name="P14"><text:span text:style-name="T3"/></text:p>
        </text:list-item>
      </text:list>
      <text:p text:style-name="P16"><text:span text:style-name="Strong_20_Emphasis"><text:span text:style-name="T1">Justification:</text:span></text:span></text:p>
      <text:p text:style-name="P16"><text:span text:style-name="T3"><text:line-break/>The architectural decision to establish city, branch, and category as independent entities was driven by business logic and the need to eliminate severe data redundancy across rows. In the client-branch-city hierarchy, city and branch data are strictly determined by the client ID. Keeping them within the order scope would introduce transitive dependencies, triggering data update anomalies.</text:span></text:p>
      <text:p text:style-name="P15">Consequently, the order entity now strictly retains transactional metadata (date, time, cost) alongside the foreign keys, effectively mitigating data duplication.</text:p>
      <text:p text:style-name="P15"/>
      <text:p text:style-name="P15"><draw:frame draw:style-name="fr1" draw:name="Imagen3" text:anchor-type="char" svg:width="19.486cm" svg:height="10.959cm" draw:z-index="2"><draw:image xlink:href="Pictures/100000010000078000000438E79B3F4D.png" xlink:type="simple" xlink:show="embed" xlink:actuate="onLoad" draw:mime-type="image/png"/></draw:frame></text:p>
      <text:p text:style-name="P15"/>
      <text:p text:style-name="P15"><text:soft-page-break/></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6T12:16:55.457731048</meta:creation-date>
    <dc:date>2026-07-06T15:51:04.724111758</dc:date>
    <meta:editing-duration>PT10M56S</meta:editing-duration>
    <meta:editing-cycles>1</meta:editing-cycles>
    <meta:document-statistic meta:table-count="0" meta:image-count="3" meta:object-count="0" meta:page-count="4" meta:paragraph-count="26" meta:word-count="447" meta:character-count="3265" meta:non-whitespace-character-count="2848"/>
    <meta:generator>LibreOffice/24.2.7.2$Linux_X86_64 LibreOffice_project/420$Build-2</meta:generator>
  </office:meta>
</office:document-meta>
</file>